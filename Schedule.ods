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866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2.631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7" number:automatic-order="true">
      <number:day-of-week/>
      <number:text>, </number:text>
      <number:month number:textual="true"/>
      <number:text> </number:text>
      <number:day/>
      <number:text>, </number:text>
      <number:year/>
    </number:date-style>
    <style:style style:name="ce1" style:family="table-cell" style:parent-style-name="Default">
      <style:table-cell-properties fo:background-color="#ccff00"/>
    </style:style>
    <style:style style:name="ce2" style:family="table-cell" style:parent-style-name="Default" style:data-style-name="N77"/>
  </office:automatic-styles>
  <office:body>
    <office:spreadsheet>
      <table:table table:name="Schedule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/>
          <table:table-cell office:value-type="date" office:date-value="2026-06-17">
            <text:p>Wed, Jun 17, 26</text:p>
          </table:table-cell>
          <table:table-cell office:value-type="string">
            <text:p>Start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IF([.A2];WORKDAY([.$B$1];[.A2]-1);&quot;&quot;)" office:value-type="date" office:date-value="2026-06-19">
            <text:p>Fri, Jun 19, 26</text:p>
          </table:table-cell>
          <table:table-cell office:value-type="string">
            <text:p>Blocked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IF([.A3];WORKDAY([.$B$1];[.A3]-1);&quot;&quot;)" office:value-type="date" office:date-value="2026-06-26">
            <text:p>Fri, Jun 26, 26</text:p>
          </table:table-cell>
          <table:table-cell office:value-type="string">
            <text:p>Blocked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IF([.A4];WORKDAY([.$B$1];[.A4]-1);&quot;&quot;)" office:value-type="date" office:date-value="2026-07-03">
            <text:p>Fri, Jul 3, 26</text:p>
          </table:table-cell>
          <table:table-cell office:value-type="string">
            <text:p>Blocked</text:p>
          </table:table-cell>
        </table:table-row>
        <table:table-row table:style-name="ro1">
          <table:table-cell/>
          <table:table-cell table:formula="of:=IF([.A5];WORKDAY([.$B$1];[.A5]-1);&quot;&quot;)">
            <text:p/>
          </table:table-cell>
          <table:table-cell/>
        </table:table-row>
        <table:table-row table:style-name="ro1">
          <table:table-cell office:value-type="string">
            <text:p>Day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00_Setup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IF([.A8];WORKDAY([.$B$1];[.A8]-1;[.$B$2:.$B$4]);&quot;&quot;)" office:value-type="date" office:date-value="2026-06-17">
            <text:p>Wed, Jun 17, 26</text:p>
          </table:table-cell>
          <table:table-cell office:value-type="string">
            <text:p>00.1 TeamUp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IF([.A9];WORKDAY([.$B$1];[.A9]-1;[.$B$2:.$B$4]);&quot;&quot;)" office:value-type="date" office:date-value="2026-06-17">
            <text:p>Wed, Jun 17, 26</text:p>
          </table:table-cell>
          <table:table-cell office:value-type="string">
            <text:p>00.2 Installation</text:p>
          </table:table-cell>
        </table:table-row>
        <table:table-row table:style-name="ro1">
          <table:table-cell/>
          <table:table-cell table:formula="of:=IF([.A10];WORKDAY([.$B$1];[.A10]-1;[.$B$2:.$B$4]);&quot;&quot;)">
            <text:p/>
          </table:table-cell>
          <table:table-cell/>
        </table:table-row>
        <table:table-row table:style-name="ro1">
          <table:table-cell/>
          <table:table-cell table:formula="of:=IF([.A11];WORKDAY([.$B$1];[.A11]-1;[.$B$2:.$B$4]);&quot;&quot;)">
            <text:p/>
          </table:table-cell>
          <table:table-cell office:value-type="string">
            <text:p>01 Git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IF([.A12];WORKDAY([.$B$1];[.A12]-1;[.$B$2:.$B$4]);&quot;&quot;)" office:value-type="date" office:date-value="2026-06-17">
            <text:p>Wed, Jun 17, 26</text:p>
          </table:table-cell>
          <table:table-cell office:value-type="string">
            <text:p>01.1 GitHub &amp; Markdown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IF([.A13];WORKDAY([.$B$1];[.A13]-1;[.$B$2:.$B$4]);&quot;&quot;)" office:value-type="date" office:date-value="2026-06-17">
            <text:p>Wed, Jun 17, 26</text:p>
          </table:table-cell>
          <table:table-cell office:value-type="string">
            <text:p>01.2 Git in VSCod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IF([.A14];WORKDAY([.$B$1];[.A14]-1;[.$B$2:.$B$4]);&quot;&quot;)" office:value-type="date" office:date-value="2026-06-17">
            <text:p>Wed, Jun 17, 26</text:p>
          </table:table-cell>
          <table:table-cell office:value-type="string">
            <text:p>01.3 Git Cleanup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IF([.A15];WORKDAY([.$B$1];[.A15]-1;[.$B$2:.$B$4]);&quot;&quot;)" office:value-type="date" office:date-value="2026-06-17">
            <text:p>Wed, Jun 17, 26</text:p>
          </table:table-cell>
          <table:table-cell office:value-type="string">
            <text:p>01.4 Check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IF([.A16];WORKDAY([.$B$1];[.A16]-1;[.$B$2:.$B$4]);&quot;&quot;)" office:value-type="date" office:date-value="2026-06-17">
            <text:p>Wed, Jun 17, 26</text:p>
          </table:table-cell>
          <table:table-cell office:value-type="string">
            <text:p>01.5 Command Line</text:p>
          </table:table-cell>
        </table:table-row>
        <table:table-row table:style-name="ro1">
          <table:table-cell/>
          <table:table-cell table:formula="of:=IF([.A17];WORKDAY([.$B$1];[.A17]-1;[.$B$2:.$B$4]);&quot;&quot;)">
            <text:p/>
          </table:table-cell>
          <table:table-cell/>
        </table:table-row>
        <table:table-row table:style-name="ro1">
          <table:table-cell/>
          <table:table-cell table:formula="of:=IF([.A18];WORKDAY([.$B$1];[.A18]-1;[.$B$2:.$B$4]);&quot;&quot;)">
            <text:p/>
          </table:table-cell>
          <table:table-cell office:value-type="string">
            <text:p>02 HTML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IF([.A19];WORKDAY([.$B$1];[.A19]-1;[.$B$2:.$B$4]);&quot;&quot;)" office:value-type="date" office:date-value="2026-06-18">
            <text:p>Thu, Jun 18, 26</text:p>
          </table:table-cell>
          <table:table-cell office:value-type="string">
            <text:p>02.1 Intro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IF([.A20];WORKDAY([.$B$1];[.A20]-1;[.$B$2:.$B$4]);&quot;&quot;)" office:value-type="date" office:date-value="2026-06-18">
            <text:p>Thu, Jun 18, 26</text:p>
          </table:table-cell>
          <table:table-cell office:value-type="string">
            <text:p>02.2 Interpretation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IF([.A21];WORKDAY([.$B$1];[.A21]-1;[.$B$2:.$B$4]);&quot;&quot;)" office:value-type="date" office:date-value="2026-06-18">
            <text:p>Thu, Jun 18, 26</text:p>
          </table:table-cell>
          <table:table-cell office:value-type="string">
            <text:p>02.3 Manipulation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IF([.A22];WORKDAY([.$B$1];[.A22]-1;[.$B$2:.$B$4]);&quot;&quot;)" office:value-type="date" office:date-value="2026-06-18">
            <text:p>Thu, Jun 18, 26</text:p>
          </table:table-cell>
          <table:table-cell office:value-type="string">
            <text:p>02.4 Tags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IF([.A23];WORKDAY([.$B$1];[.A23]-1;[.$B$2:.$B$4]);&quot;&quot;)" office:value-type="date" office:date-value="2026-06-18">
            <text:p>Thu, Jun 18, 26</text:p>
          </table:table-cell>
          <table:table-cell office:value-type="string">
            <text:p>02.5 GitHub Pages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IF([.A24];WORKDAY([.$B$1];[.A24]-1;[.$B$2:.$B$4]);&quot;&quot;)" office:value-type="date" office:date-value="2026-06-18">
            <text:p>Thu, Jun 18, 26</text:p>
          </table:table-cell>
          <table:table-cell office:value-type="string">
            <text:p>02.6 Branching Story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IF([.A25];WORKDAY([.$B$1];[.A25]-1;[.$B$2:.$B$4]);&quot;&quot;)" office:value-type="date" office:date-value="2026-06-18">
            <text:p>Thu, Jun 18, 26</text:p>
          </table:table-cell>
          <table:table-cell office:value-type="string">
            <text:p>02.7 Portfolio</text:p>
          </table:table-cell>
        </table:table-row>
        <table:table-row table:style-name="ro1">
          <table:table-cell/>
          <table:table-cell table:formula="of:=IF([.A26];WORKDAY([.$B$1];[.A26]-1;[.$B$2:.$B$4]);&quot;&quot;)">
            <text:p/>
          </table:table-cell>
          <table:table-cell/>
        </table:table-row>
        <table:table-row table:style-name="ro1">
          <table:table-cell/>
          <table:table-cell table:formula="of:=IF([.A27];WORKDAY([.$B$1];[.A27]-1;[.$B$2:.$B$4]);&quot;&quot;)">
            <text:p/>
          </table:table-cell>
          <table:table-cell office:value-type="string">
            <text:p>03 CSS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IF([.A28];WORKDAY([.$B$1];[.A28]-1;[.$B$2:.$B$4]);&quot;&quot;)" office:value-type="date" office:date-value="2026-06-22">
            <text:p>Mon, Jun 22, 26</text:p>
          </table:table-cell>
          <table:table-cell office:value-type="string">
            <text:p>03.1 Overview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IF([.A29];WORKDAY([.$B$1];[.A29]-1;[.$B$2:.$B$4]);&quot;&quot;)" office:value-type="date" office:date-value="2026-06-22">
            <text:p>Mon, Jun 22, 26</text:p>
          </table:table-cell>
          <table:table-cell office:value-type="string">
            <text:p>03.2 Selectors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IF([.A30];WORKDAY([.$B$1];[.A30]-1;[.$B$2:.$B$4]);&quot;&quot;)" office:value-type="date" office:date-value="2026-06-22">
            <text:p>Mon, Jun 22, 26</text:p>
          </table:table-cell>
          <table:table-cell office:value-type="string">
            <text:p>03.3 Layout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IF([.A31];WORKDAY([.$B$1];[.A31]-1;[.$B$2:.$B$4]);&quot;&quot;)" office:value-type="date" office:date-value="2026-06-22">
            <text:p>Mon, Jun 22, 26</text:p>
          </table:table-cell>
          <table:table-cell office:value-type="string">
            <text:p>03.4 Demonstration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IF([.A32];WORKDAY([.$B$1];[.A32]-1;[.$B$2:.$B$4]);&quot;&quot;)" office:value-type="date" office:date-value="2026-06-22">
            <text:p>Mon, Jun 22, 26</text:p>
          </table:table-cell>
          <table:table-cell office:value-type="string">
            <text:p>03.5 Anima-, Transi-, Interac-tion</text:p>
          </table:table-cell>
        </table:table-row>
        <table:table-row table:style-name="ro1">
          <table:table-cell/>
          <table:table-cell table:formula="of:=IF([.A33];WORKDAY([.$B$1];[.A33]-1;[.$B$2:.$B$4]);&quot;&quot;)">
            <text:p/>
          </table:table-cell>
          <table:table-cell/>
        </table:table-row>
        <table:table-row table:style-name="ro1">
          <table:table-cell/>
          <table:table-cell table:formula="of:=IF([.A34];WORKDAY([.$B$1];[.A34]-1;[.$B$2:.$B$4]);&quot;&quot;)">
            <text:p/>
          </table:table-cell>
          <table:table-cell office:value-type="string">
            <text:p>04 Basics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IF([.A35];WORKDAY([.$B$1];[.A35]-1;[.$B$2:.$B$4]);&quot;&quot;)" office:value-type="date" office:date-value="2026-06-23">
            <text:p>Tue, Jun 23, 26</text:p>
          </table:table-cell>
          <table:table-cell office:value-type="string">
            <text:p>04.1 Variables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IF([.A36];WORKDAY([.$B$1];[.A36]-1;[.$B$2:.$B$4]);&quot;&quot;)" office:value-type="date" office:date-value="2026-06-23">
            <text:p>Tue, Jun 23, 26</text:p>
          </table:table-cell>
          <table:table-cell office:value-type="string">
            <text:p>04.2 Functions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formula="of:=IF([.A37];WORKDAY([.$B$1];[.A37]-1;[.$B$2:.$B$4]);&quot;&quot;)" office:value-type="date" office:date-value="2026-06-24">
            <text:p>Wed, Jun 24, 26</text:p>
          </table:table-cell>
          <table:table-cell office:value-type="string">
            <text:p>04.3 Complex Types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IF([.A38];WORKDAY([.$B$1];[.A38]-1;[.$B$2:.$B$4]);&quot;&quot;)" office:value-type="date" office:date-value="2026-06-25">
            <text:p>Thu, Jun 25, 26</text:p>
          </table:table-cell>
          <table:table-cell office:value-type="string">
            <text:p>04.4 Branching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IF([.A39];WORKDAY([.$B$1];[.A39]-1;[.$B$2:.$B$4]);&quot;&quot;)" office:value-type="date" office:date-value="2026-06-29">
            <text:p>Mon, Jun 29, 26</text:p>
          </table:table-cell>
          <table:table-cell office:value-type="string">
            <text:p>04.5 Loops</text:p>
          </table:table-cell>
        </table:table-row>
        <table:table-row table:style-name="ro1">
          <table:table-cell/>
          <table:table-cell table:formula="of:=IF([.A40];WORKDAY([.$B$1];[.A40]-1;[.$B$2:.$B$4]);&quot;&quot;)">
            <text:p/>
          </table:table-cell>
          <table:table-cell/>
        </table:table-row>
        <table:table-row table:style-name="ro1">
          <table:table-cell/>
          <table:table-cell table:formula="of:=IF([.A41];WORKDAY([.$B$1];[.A41]-1;[.$B$2:.$B$4]);&quot;&quot;)">
            <text:p/>
          </table:table-cell>
          <table:table-cell office:value-type="string">
            <text:p>05 Application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IF([.A42];WORKDAY([.$B$1];[.A42]-1;[.$B$2:.$B$4]);&quot;&quot;)" office:value-type="date" office:date-value="2026-06-30">
            <text:p>Tue, Jun 30, 26</text:p>
          </table:table-cell>
          <table:table-cell office:value-type="string">
            <text:p>05.1 DOM-Manipulation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formula="of:=IF([.A43];WORKDAY([.$B$1];[.A43]-1;[.$B$2:.$B$4]);&quot;&quot;)" office:value-type="date" office:date-value="2026-07-01">
            <text:p>Wed, Jul 1, 26</text:p>
          </table:table-cell>
          <table:table-cell office:value-type="string">
            <text:p>05.2 Event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IF([.A44];WORKDAY([.$B$1];[.A44]-1;[.$B$2:.$B$4]);&quot;&quot;)" office:value-type="date" office:date-value="2026-07-02">
            <text:p>Thu, Jul 2, 26</text:p>
          </table:table-cell>
          <table:table-cell office:value-type="string">
            <text:p>05.3 Animation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IF([.A45];WORKDAY([.$B$1];[.A45]-1;[.$B$2:.$B$4]);&quot;&quot;)" office:value-type="date" office:date-value="2026-07-06">
            <text:p>Mon, Jul 6, 26</text:p>
          </table:table-cell>
          <table:table-cell office:value-type="string">
            <text:p>05.4 Collisio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IF([.A46];WORKDAY([.$B$1];[.A46]-1;[.$B$2:.$B$4]);&quot;&quot;)" office:value-type="date" office:date-value="2026-07-07">
            <text:p>Tue, Jul 7, 26</text:p>
          </table:table-cell>
          <table:table-cell office:value-type="string">
            <text:p>05.5 Control</text:p>
          </table:table-cell>
        </table:table-row>
        <table:table-row table:style-name="ro1">
          <table:table-cell/>
          <table:table-cell table:formula="of:=IF([.A47];WORKDAY([.$B$1];[.A47]-1;[.$B$2:.$B$4]);&quot;&quot;)">
            <text:p/>
          </table:table-cell>
          <table:table-cell/>
        </table:table-row>
        <table:table-row table:style-name="ro1">
          <table:table-cell table:style-name="ce1" office:value-type="float" office:value="13">
            <text:p>13</text:p>
          </table:table-cell>
          <table:table-cell table:formula="of:=IF([.A48];WORKDAY([.$B$1];[.A48]-1;[.$B$2:.$B$4]);&quot;&quot;)" office:value-type="date" office:date-value="2026-07-08">
            <text:p>Wed, Jul 8, 26</text:p>
          </table:table-cell>
          <table:table-cell office:value-type="string">
            <text:p>06 Final Assignmen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IF([.A49];WORKDAY([.$B$1];[.A49]-1;[.$B$2:.$B$4]);&quot;&quot;)" office:value-type="date" office:date-value="2026-07-09">
            <text:p>Thu, Jul 9, 26</text:p>
          </table:table-cell>
          <table:table-cell office:value-type="string">
            <text:p>06 Final Assign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IF([.A51];WORKDAY([.$B$1];[.A51]-1;[.$B$2:.$B$4]);&quot;&quot;)" office:value-type="date" office:date-value="2026-07-10">
            <text:p>Fri, Jul 10, 26</text:p>
          </table:table-cell>
          <table:table-cell office:value-type="string">
            <text:p>Exam</text:p>
          </table:table-cell>
        </table:table-row>
        <table:table-row table:style-name="ro1" table:number-rows-repeated="104852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04">06/04/2026</text:date>, <text:time>15:30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6-04-11T20:01:45.07</meta:creation-date>
    <dc:date>2026-06-04T15:30:31.04</dc:date>
    <dc:creator>Jirka Dell'Oro-Friedl</dc:creator>
    <meta:editing-duration>PT54M19S</meta:editing-duration>
    <meta:editing-cycles>5</meta:editing-cycles>
    <meta:generator>OpenOffice/4.1.15$Win32 OpenOffice.org_project/4115m2$Build-9813</meta:generator>
    <meta:document-statistic meta:table-count="3" meta:cell-count="139" meta:object-count="0"/>
  </office:meta>
</office:document-meta>
</file>